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text-indent="0cm" style:auto-text-indent="fals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0">
      <style:paragraph-properties fo:margin-left="0cm" fo:margin-right="0cm" fo:text-indent="0cm" style:auto-text-indent="false"/>
    </style:style>
    <style:style style:name="P29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1">
      <style:paragraph-properties fo:margin-left="0cm" fo:margin-right="0cm" fo:text-indent="0cm" style:auto-text-indent="false"/>
    </style:style>
    <style:style style:name="P31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2"/>
    <style:style style:name="T1" style:family="text">
      <style:text-properties fo:background-color="#579d1c" loext:char-shading-value="0"/>
    </style:style>
    <style:style style:name="T2" style:family="text">
      <style:text-properties fo:background-color="#579d1c" loext:char-shading-value="0"/>
    </style:style>
    <style:style style:name="Sect1" style:family="section">
      <style:section-properties fo:margin-left="0cm" fo:margin-right="0cm" style:editable="false">
        <style:columns fo:column-count="3" fo:column-gap="0.265cm">
          <style:column style:rel-width="21845*" fo:start-indent="0cm" fo:end-indent="0.132cm"/>
          <style:column style:rel-width="21845*" fo:start-indent="0.132cm" fo:end-indent="0.132cm"/>
          <style:column style:rel-width="21845*" fo:start-indent="0.132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Griekse_goden"/>Griekse goden</text:h>
      <text:list text:style-name="L1">
        <text:list-item>
          <text:p text:style-name="P1"><text:a xlink:type="simple" xlink:href="https://nl.wikipedia.org/wiki/Aphrodite" text:style-name="Internet_20_link" text:visited-style-name="Visited_20_Internet_20_Link"><text:bookmark text:name="mwDg"/><text:bookmark text:name="mwDQ"/><text:bookmark text:name="mwDA"/><text:span text:style-name="T1">Aphrodite</text:span></text:a> (geboren uit het bloed van <text:bookmark text:name="mwDw"/><text:a xlink:type="simple" xlink:href="https://nl.wikipedia.org/wiki/Ouranos" text:style-name="Internet_20_link" text:visited-style-name="Visited_20_Internet_20_Link">Ouranos</text:a> op de zee, hiermee de oudste godin, godin van liefde, vruchtbaarheid, schoonheid en beschermster van flora en fauna,) </text:p>
        </text:list-item>
        <text:list-item>
          <text:p text:style-name="P1"><text:a xlink:type="simple" xlink:href="https://nl.wikipedia.org/wiki/Apollo_(Griekse_mythologie)" text:style-name="Internet_20_link" text:visited-style-name="Visited_20_Internet_20_Link"><text:bookmark text:name="mwEQ"/><text:bookmark text:name="mwEA"/><text:span text:style-name="T1">Apollo</text:span></text:a> (zoon van <text:bookmark text:name="mwEg"/><text:a xlink:type="simple" xlink:href="https://nl.wikipedia.org/wiki/Zeus" text:style-name="Internet_20_link" text:visited-style-name="Visited_20_Internet_20_Link">Zeus</text:a> en <text:bookmark text:name="mwEw"/><text:a xlink:type="simple" xlink:href="https://nl.wikipedia.org/wiki/Leto_(mythologie)" text:style-name="Internet_20_link" text:visited-style-name="Visited_20_Internet_20_Link"><text:span text:style-name="T1">Leto</text:span></text:a>, zon, orakel, geneeskunde, voorspellingskunst en muziek) </text:p>
        </text:list-item>
        <text:list-item>
          <text:p text:style-name="P1"><text:a xlink:type="simple" xlink:href="https://nl.wikipedia.org/wiki/Ares_(mythologie)" text:style-name="Internet_20_link" text:visited-style-name="Visited_20_Internet_20_Link"><text:bookmark text:name="mwFQ"/><text:bookmark text:name="mwFA"/><text:span text:style-name="T1">Ares</text:span></text:a> (zoon van <text:bookmark text:name="mwFg"/><text:a xlink:type="simple" xlink:href="https://nl.wikipedia.org/wiki/Hera" text:style-name="Internet_20_link" text:visited-style-name="Visited_20_Internet_20_Link">Hera</text:a> en Zeus, oorlog, krijgslust) </text:p>
        </text:list-item>
        <text:list-item>
          <text:p text:style-name="P1"><text:a xlink:type="simple" xlink:href="https://nl.wikipedia.org/wiki/Artemis_(mythologie)" text:style-name="Internet_20_link" text:visited-style-name="Visited_20_Internet_20_Link"><text:bookmark text:name="mwGA"/><text:bookmark text:name="mwFw"/><text:span text:style-name="T1">Artemis</text:span></text:a><text:span text:style-name="T1"> </text:span>(tweelingzuster van Apollo, dochter van Zeus en Leto, maan, jacht, maagden, wilde dieren en kuisheid, maar ook vruchtbaarheid) </text:p>
        </text:list-item>
        <text:list-item>
          <text:p text:style-name="P1"><text:a xlink:type="simple" xlink:href="https://nl.wikipedia.org/wiki/Demeter_(mythologie)" text:style-name="Internet_20_link" text:visited-style-name="Visited_20_Internet_20_Link"><text:bookmark text:name="mwGg"/><text:bookmark text:name="mwGQ"/><text:span text:style-name="T1">Demeter</text:span></text:a><text:span text:style-name="T1"> </text:span>(zuster van Zeus, landbouw, oogst en graan) </text:p>
        </text:list-item>
        <text:list-item>
          <text:p text:style-name="P1"><text:a xlink:type="simple" xlink:href="https://nl.wikipedia.org/wiki/Dionysos_(mythologie)" text:style-name="Internet_20_link" text:visited-style-name="Visited_20_Internet_20_Link"><text:bookmark text:name="mwHA"/><text:bookmark text:name="mwGw"/><text:span text:style-name="T1">Dionysos</text:span></text:a>, ook wel Bakchos of Iakchos (druiven, wijn, feesten en theater) </text:p>
        </text:list-item>
        <text:list-item>
          <text:p text:style-name="P1"><text:a xlink:type="simple" xlink:href="https://nl.wikipedia.org/wiki/Eros_(god)" text:style-name="Internet_20_link" text:visited-style-name="Visited_20_Internet_20_Link"><text:bookmark text:name="mwHg"/><text:bookmark text:name="mwHQ"/><text:span text:style-name="T2">Eros</text:span></text:a><text:span text:style-name="T2"> </text:span>(god van de liefde, zoon van Aphrodite soms aangegeven als minnaar van Aphrodite) </text:p>
        </text:list-item>
        <text:list-item>
          <text:p text:style-name="P1"><text:a xlink:type="simple" xlink:href="https://nl.wikipedia.org/wiki/Hades" text:style-name="Internet_20_link" text:visited-style-name="Visited_20_Internet_20_Link"><text:bookmark text:name="mwIA"/><text:bookmark text:name="mwHw"/><text:span text:style-name="T2">Hades</text:span></text:a> (zoon van <text:bookmark text:name="mwIQ"/><text:a xlink:type="simple" xlink:href="https://nl.wikipedia.org/wiki/Kronos" text:style-name="Internet_20_link" text:visited-style-name="Visited_20_Internet_20_Link">Kronos</text:a>, broer van Poseidon en Zeus, hoorn des overvloeds, rijkdom en god van de onderwereld) </text:p>
        </text:list-item>
        <text:list-item>
          <text:p text:style-name="P1"><text:a xlink:type="simple" xlink:href="https://nl.wikipedia.org/wiki/Hebe_(mythologie)" text:style-name="Internet_20_link" text:visited-style-name="Visited_20_Internet_20_Link"><text:bookmark text:name="mwIw"/><text:bookmark text:name="mwIg"/>Hebe</text:a> (schenkster van de goden, later vrouw van <text:bookmark text:name="mwJA"/><text:a xlink:type="simple" xlink:href="https://nl.wikipedia.org/wiki/Herakles_(mythologie)" text:style-name="Internet_20_link" text:visited-style-name="Visited_20_Internet_20_Link">Herakles</text:a>, jeugd) </text:p>
        </text:list-item>
        <text:list-item>
          <text:p text:style-name="P1"><text:a xlink:type="simple" xlink:href="https://nl.wikipedia.org/wiki/Hephaistos" text:style-name="Internet_20_link" text:visited-style-name="Visited_20_Internet_20_Link"><text:bookmark text:name="mwJg"/><text:bookmark text:name="mwJQ"/><text:span text:style-name="T2">Hephaistos</text:span></text:a> (zoon van Hera en Zeus, smeedwerk, vuur en ambachten) </text:p>
        </text:list-item>
        <text:list-item>
          <text:p text:style-name="P1"><text:a xlink:type="simple" xlink:href="https://nl.wikipedia.org/wiki/Hera" text:style-name="Internet_20_link" text:visited-style-name="Visited_20_Internet_20_Link"><text:bookmark text:name="mwKA"/><text:bookmark text:name="mwJw"/>H<text:span text:style-name="T2">era</text:span></text:a> (dochter van Kronos, zuster en vrouw van Zeus, beschermt het gezin, vrouw en huwelijk) </text:p>
        </text:list-item>
        <text:list-item>
          <text:p text:style-name="P1"><text:a xlink:type="simple" xlink:href="https://nl.wikipedia.org/wiki/Hermes_(mythologie)" text:style-name="Internet_20_link" text:visited-style-name="Visited_20_Internet_20_Link"><text:bookmark text:name="mwKg"/><text:bookmark text:name="mwKQ"/>H<text:span text:style-name="T2">ermes</text:span></text:a><text:span text:style-name="T2"> (</text:span>zoon van Zeus en <text:bookmark text:name="mwKw"/><text:a xlink:type="simple" xlink:href="https://nl.wikipedia.org/wiki/Maia_(mythologie)" text:style-name="Internet_20_link" text:visited-style-name="Visited_20_Internet_20_Link">Maia</text:a>, handel, reizigers, dieven, boodschapper van de goden) </text:p>
        </text:list-item>
        <text:list-item>
          <text:p text:style-name="P1"><text:a xlink:type="simple" xlink:href="https://nl.wikipedia.org/wiki/Hestia_(mythologie)" text:style-name="Internet_20_link" text:visited-style-name="Visited_20_Internet_20_Link"><text:bookmark text:name="mwLQ"/><text:bookmark text:name="mwLA"/><text:span text:style-name="T2">Hestia</text:span></text:a> (huis en haard, familie) </text:p>
        </text:list-item>
        <text:list-item>
          <text:p text:style-name="P1"><text:a xlink:type="simple" xlink:href="https://nl.wikipedia.org/wiki/Iris_(godin)" text:style-name="Internet_20_link" text:visited-style-name="Visited_20_Internet_20_Link"><text:bookmark text:name="mwLw"/><text:bookmark text:name="mwLg"/>Iris</text:a> (boodschapper goden en laat regenboog achter) </text:p>
        </text:list-item>
        <text:list-item>
          <text:p text:style-name="P1"><text:a xlink:type="simple" xlink:href="https://nl.wikipedia.org/wiki/Pallas_Athena" text:style-name="Internet_20_link" text:visited-style-name="Visited_20_Internet_20_Link"><text:bookmark text:name="mwMQ"/><text:bookmark text:name="mwMA"/><text:span text:style-name="T2">Pallas Athena</text:span></text:a> (dochter van Zeus, beschermster van kunstenaars, handwerkslieden en Athene, oorlog, wijsheid, oorlogsgodin, beschermengel van Griekse helden) </text:p>
        </text:list-item>
        <text:list-item>
          <text:p text:style-name="P1"><text:a xlink:type="simple" xlink:href="https://nl.wikipedia.org/wiki/Pan_(mythologie)" text:style-name="Internet_20_link" text:visited-style-name="Visited_20_Internet_20_Link"><text:bookmark text:name="mwMw"/><text:bookmark text:name="mwMg"/>Pan</text:a> (woud, herdersleven wildernis en de muziek) </text:p>
        </text:list-item>
        <text:list-item>
          <text:p text:style-name="P1"><text:a xlink:type="simple" xlink:href="https://nl.wikipedia.org/wiki/Panacea" text:style-name="Internet_20_link" text:visited-style-name="Visited_20_Internet_20_Link"><text:bookmark text:name="mwNQ"/><text:bookmark text:name="mwNA"/>Panacea</text:a> (mythologie) (godin van de geneesmiddelen) </text:p>
        </text:list-item>
        <text:list-item>
          <text:p text:style-name="P1"><text:a xlink:type="simple" xlink:href="https://nl.wikipedia.org/wiki/Persephone_(mythologie)" text:style-name="Internet_20_link" text:visited-style-name="Visited_20_Internet_20_Link"><text:bookmark text:name="mwNw"/><text:bookmark text:name="mwNg"/><text:span text:style-name="T2">Persephone</text:span></text:a> (godin van het dodenrijk en het voorjaar, vrouw van Hades en dochter van Demeter) </text:p>
        </text:list-item>
        <text:list-item>
          <text:p text:style-name="P1"><text:a xlink:type="simple" xlink:href="https://nl.wikipedia.org/wiki/Poseidon_(mythologie)" text:style-name="Internet_20_link" text:visited-style-name="Visited_20_Internet_20_Link"><text:bookmark text:name="mwOQ"/><text:bookmark text:name="mwOA"/><text:span text:style-name="T2">Poseidon</text:span></text:a><text:span text:style-name="T2"> </text:span>(zoon van Kronos, broer van Zeus en Hades, god van de zeeën, aardbevingen en paarden) </text:p>
        </text:list-item>
        <text:list-item>
          <text:p text:style-name="P2"><text:a xlink:type="simple" xlink:href="https://nl.wikipedia.org/wiki/Zeus" text:style-name="Internet_20_link" text:visited-style-name="Visited_20_Internet_20_Link"><text:bookmark text:name="mwOw"/><text:bookmark text:name="mwOg"/><text:span text:style-name="T2">Zeus</text:span></text:a><text:span text:style-name="T2"> </text:span>(zoon van Kronos, oppergod: koning van goden, heerst over de hemel, lucht, het weer en de bliksem)</text:p>
        </text:list-item>
      </text:list>
      <text:h text:style-name="P3" text:outline-level="2"><text:a xlink:type="simple" xlink:href="https://nl.wikipedia.org/wiki/Griekse_oergoden" text:style-name="Internet_20_link" text:visited-style-name="Visited_20_Internet_20_Link"><text:bookmark text:name="mwPQ"/><text:bookmark text:name="Oergoden"/>Oergoden</text:a></text:h>
      <text:section text:style-name="Sect1" text:name="mwPw">
        <text:list text:style-name="L2">
          <text:list-item>
            <text:p text:style-name="P4"><text:a xlink:type="simple" xlink:href="https://nl.wikipedia.org/wiki/Aether" text:style-name="Internet_20_link" text:visited-style-name="Visited_20_Internet_20_Link">Aether</text:a> (de atmosfeer) </text:p>
          </text:list-item>
          <text:list-item>
            <text:p text:style-name="P5"><text:a xlink:type="simple" xlink:href="https://nl.wikipedia.org/wiki/Chaos_(Griekse_mythologie)" text:style-name="Internet_20_link" text:visited-style-name="Visited_20_Internet_20_Link"><text:span text:style-name="T2">Chaos</text:span></text:a><text:span text:style-name="T2"> </text:span>(de leegte) </text:p>
          </text:list-item>
          <text:list-item>
            <text:p text:style-name="P5"><text:a xlink:type="simple" xlink:href="https://nl.wikipedia.org/wiki/Erebos" text:style-name="Internet_20_link" text:visited-style-name="Visited_20_Internet_20_Link"><text:span text:style-name="T2">Erebos</text:span></text:a><text:span text:style-name="T2"> (</text:span>het duister) </text:p>
          </text:list-item>
          <text:list-item>
            <text:p text:style-name="P5"><text:a xlink:type="simple" xlink:href="https://nl.wikipedia.org/wiki/Eros_(god)" text:style-name="Internet_20_link" text:visited-style-name="Visited_20_Internet_20_Link"><text:span text:style-name="T2">Eros</text:span></text:a> (de liefde) </text:p>
          </text:list-item>
          <text:list-item>
            <text:p text:style-name="P5"><text:a xlink:type="simple" xlink:href="https://nl.wikipedia.org/wiki/Gaia_(mythologie)" text:style-name="Internet_20_link" text:visited-style-name="Visited_20_Internet_20_Link"><text:span text:style-name="T2">Gaia</text:span></text:a><text:span text:style-name="T2"> </text:span>(de aarde) </text:p>
          </text:list-item>
          <text:list-item>
            <text:p text:style-name="P5"><text:a xlink:type="simple" xlink:href="https://nl.wikipedia.org/wiki/Hemera" text:style-name="Internet_20_link" text:visited-style-name="Visited_20_Internet_20_Link">Hemera</text:a> (de dag) </text:p>
          </text:list-item>
          <text:list-item>
            <text:p text:style-name="P5"><text:a xlink:type="simple" xlink:href="https://nl.wikipedia.org/wiki/Nyx_(godin)" text:style-name="Internet_20_link" text:visited-style-name="Visited_20_Internet_20_Link"><text:span text:style-name="T2">Nyx</text:span></text:a><text:span text:style-name="T2"> </text:span>(de nacht) </text:p>
          </text:list-item>
          <text:list-item>
            <text:p text:style-name="P5"><text:a xlink:type="simple" xlink:href="https://nl.wikipedia.org/wiki/Tartaros" text:style-name="Internet_20_link" text:visited-style-name="Visited_20_Internet_20_Link">Tartaros</text:a> (de onderwereld) </text:p>
          </text:list-item>
          <text:list-item>
            <text:p text:style-name="P5"><text:a xlink:type="simple" xlink:href="https://nl.wikipedia.org/wiki/Ouranos" text:style-name="Internet_20_link" text:visited-style-name="Visited_20_Internet_20_Link"><text:span text:style-name="T2">Ouranos</text:span></text:a><text:span text:style-name="T2"> </text:span>(de hemel) </text:p>
          </text:list-item>
          <text:list-item>
            <text:p text:style-name="P6"><text:a xlink:type="simple" xlink:href="https://nl.wikipedia.org/wiki/Sfinx_(mythologie)#Griekse_sfinx" text:style-name="Internet_20_link" text:visited-style-name="Visited_20_Internet_20_Link">Sphinx</text:a> (het geluk)</text:p>
          </text:list-item>
        </text:list>
        <text:h text:style-name="P3" text:outline-level="2"><text:bookmark text:name="Zee-_en_riviergoden"/>Zee- en riviergoden</text:h>
        <text:p text:style-name="P7"><text:bookmark text:name="mwQQ"/>Elke waterloop, zij het een zee, een oceaan, een rivier of een bron, heeft zijn eigen god. Op deze manier kan een rivier in een bepaalde mythe gepersonificeerd worden.</text:p>
        <text:section text:style-name="Sect1" text:name="mwQw">
          <text:list text:style-name="L3">
            <text:list-item>
              <text:p text:style-name="P8"><text:a xlink:type="simple" xlink:href="https://nl.wikipedia.org/wiki/Acheloüs_(mythologie)" text:style-name="Internet_20_link" text:visited-style-name="Visited_20_Internet_20_Link">Achelous</text:a> </text:p>
            </text:list-item>
            <text:list-item>
              <text:p text:style-name="P9"><text:a xlink:type="simple" xlink:href="https://nl.wikipedia.org/wiki/Acheron_(mythologie)" text:style-name="Internet_20_link" text:visited-style-name="Visited_20_Internet_20_Link">Acheron</text:a> </text:p>
            </text:list-item>
            <text:list-item>
              <text:p text:style-name="P9"><text:a xlink:type="simple" xlink:href="https://nl.wikipedia.org/wiki/Acis_(god)" text:style-name="Internet_20_link" text:visited-style-name="Visited_20_Internet_20_Link">Acis</text:a> </text:p>
            </text:list-item>
            <text:list-item>
              <text:p text:style-name="P9"><text:a xlink:type="simple" xlink:href="https://nl.wikipedia.org/wiki/Alpheüs_(mythologie)" text:style-name="Internet_20_link" text:visited-style-name="Visited_20_Internet_20_Link">Alpheus</text:a> </text:p>
            </text:list-item>
            <text:list-item>
              <text:p text:style-name="P9"><text:a xlink:type="simple" xlink:href="https://nl.wikipedia.org/wiki/Amphitrite_(mythologie)" text:style-name="Internet_20_link" text:visited-style-name="Visited_20_Internet_20_Link">Amphitrite</text:a> </text:p>
            </text:list-item>
            <text:list-item>
              <text:p text:style-name="P9"><text:a xlink:type="simple" xlink:href="https://nl.wikipedia.org/wiki/Asopus" text:style-name="Internet_20_link" text:visited-style-name="Visited_20_Internet_20_Link">Asopus</text:a> </text:p>
            </text:list-item>
            <text:list-item>
              <text:p text:style-name="P9"><text:a xlink:type="simple" xlink:href="https://nl.wikipedia.org/wiki/Ceto_(mythologie)" text:style-name="Internet_20_link" text:visited-style-name="Visited_20_Internet_20_Link">Ceto</text:a> </text:p>
            </text:list-item>
            <text:list-item>
              <text:p text:style-name="P9"><text:a xlink:type="simple" xlink:href="https://nl.wikipedia.org/wiki/Glaucus_(mythologie)" text:style-name="Internet_20_link" text:visited-style-name="Visited_20_Internet_20_Link">Glaucus</text:a> </text:p>
            </text:list-item>
            <text:list-item>
              <text:p text:style-name="P9"><text:a xlink:type="simple" xlink:href="https://nl.wikipedia.org/wiki/Ino_(mythologie)" text:style-name="Internet_20_link" text:visited-style-name="Visited_20_Internet_20_Link">Leucothea</text:a> </text:p>
            </text:list-item>
            <text:list-item>
              <text:p text:style-name="P9">De <text:a xlink:type="simple" xlink:href="https://nl.wikipedia.org/wiki/Naiaden" text:style-name="Internet_20_link" text:visited-style-name="Visited_20_Internet_20_Link">Naiaden</text:a> </text:p>
              <text:list>
                <text:list-item>
                  <text:p text:style-name="P9"><text:a xlink:type="simple" xlink:href="https://nl.wikipedia.org/wiki/Aegle_(nimf)" text:style-name="Internet_20_link" text:visited-style-name="Visited_20_Internet_20_Link">Aegle</text:a> (Volgens sommigen was <text:soft-page-break/>zij bij <text:a xlink:type="simple" xlink:href="https://nl.wikipedia.org/wiki/Helios_(zonnegod)" text:style-name="Internet_20_link" text:visited-style-name="Visited_20_Internet_20_Link">Helios</text:a> de moeder der <text:a xlink:type="simple" xlink:href="https://nl.wikipedia.org/wiki/Gratiën" text:style-name="Internet_20_link" text:visited-style-name="Visited_20_Internet_20_Link">Chariten</text:a>. Zij is een personificatie van de glans van het zonnelicht.) </text:p>
                </text:list-item>
                <text:list-item>
                  <text:p text:style-name="P9"><text:a xlink:type="simple" xlink:href="https://nl.wikipedia.org/wiki/Castalia_(mythologie)" text:style-name="Internet_20_link" text:visited-style-name="Visited_20_Internet_20_Link">Castalia</text:a> </text:p>
                </text:list-item>
                <text:list-item>
                  <text:p text:style-name="P9"><text:a xlink:type="simple" xlink:href="https://nl.wikipedia.org/wiki/Creüsa_(nimf)" text:style-name="Internet_20_link" text:visited-style-name="Visited_20_Internet_20_Link">Creüsa</text:a> </text:p>
                </text:list-item>
                <text:list-item>
                  <text:p text:style-name="P9"><text:a xlink:type="simple" xlink:href="https://nl.wikipedia.org/wiki/Eurydice_(mythologie)" text:style-name="Internet_20_link" text:visited-style-name="Visited_20_Internet_20_Link">Eurydice</text:a> </text:p>
                </text:list-item>
                <text:list-item>
                  <text:p text:style-name="P9"><text:a xlink:type="simple" xlink:href="https://nl.wikipedia.org/wiki/Lilaea" text:style-name="Internet_20_link" text:visited-style-name="Visited_20_Internet_20_Link">Lilaea</text:a> </text:p>
                </text:list-item>
                <text:list-item>
                  <text:p text:style-name="P9"><text:a xlink:type="simple" xlink:href="https://nl.wikipedia.org/wiki/Melite_(naiade)" text:style-name="Internet_20_link" text:visited-style-name="Visited_20_Internet_20_Link">Melite</text:a> </text:p>
                </text:list-item>
                <text:list-item>
                  <text:p text:style-name="P9"><text:a xlink:type="simple" xlink:href="https://nl.wikipedia.org/wiki/Nomia_(nimf)?action=edit&amp;redlink=1" text:style-name="Internet_20_link" text:visited-style-name="Visited_20_Internet_20_Link">Nomia</text:a> </text:p>
                </text:list-item>
                <text:list-item>
                  <text:p text:style-name="P9"><text:a xlink:type="simple" xlink:href="https://nl.wikipedia.org/wiki/Periboia" text:style-name="Internet_20_link" text:visited-style-name="Visited_20_Internet_20_Link">Periboia</text:a> </text:p>
                </text:list-item>
                <text:list-item>
                  <text:p text:style-name="P9"><text:a xlink:type="simple" xlink:href="https://nl.wikipedia.org/wiki/Crinaeae" text:style-name="Internet_20_link" text:visited-style-name="Visited_20_Internet_20_Link">Crinaeae</text:a> (springend water) </text:p>
                </text:list-item>
                <text:list-item>
                  <text:p text:style-name="P9"><text:a xlink:type="simple" xlink:href="https://nl.wikipedia.org/wiki/Eleionomae" text:style-name="Internet_20_link" text:visited-style-name="Visited_20_Internet_20_Link">Eleionomae</text:a> (moerassen en zee) </text:p>
                </text:list-item>
                <text:list-item>
                  <text:p text:style-name="P9"><text:a xlink:type="simple" xlink:href="https://nl.wikipedia.org/wiki/Limnaden" text:style-name="Internet_20_link" text:visited-style-name="Visited_20_Internet_20_Link">Limnaden</text:a> (meren) </text:p>
                </text:list-item>
                <text:list-item>
                  <text:p text:style-name="P9"><text:a xlink:type="simple" xlink:href="https://nl.wikipedia.org/wiki/Pegaeae" text:style-name="Internet_20_link" text:visited-style-name="Visited_20_Internet_20_Link">Pegaeae</text:a> (bronnen) </text:p>
                </text:list-item>
                <text:list-item>
                  <text:p text:style-name="P9"><text:a xlink:type="simple" xlink:href="https://nl.wikipedia.org/wiki/Potamiden" text:style-name="Internet_20_link" text:visited-style-name="Visited_20_Internet_20_Link">Potamiden</text:a> (rivieren)</text:p>
                </text:list-item>
              </text:list>
            </text:list-item>
            <text:list-item>
              <text:p text:style-name="P9"><text:a xlink:type="simple" xlink:href="https://nl.wikipedia.org/wiki/Nereus_(mythologie)" text:style-name="Internet_20_link" text:visited-style-name="Visited_20_Internet_20_Link">Nereus</text:a> </text:p>
              <text:list>
                <text:list-item>
                  <text:p text:style-name="P9">De <text:a xlink:type="simple" xlink:href="https://nl.wikipedia.org/wiki/Nereïden" text:style-name="Internet_20_link" text:visited-style-name="Visited_20_Internet_20_Link">Nereïden</text:a> </text:p>
                  <text:list>
                    <text:list-item>
                      <text:p text:style-name="P9"><text:a xlink:type="simple" xlink:href="https://nl.wikipedia.org/wiki/Amphitrite_(mythologie)" text:style-name="Internet_20_link" text:visited-style-name="Visited_20_Internet_20_Link">Amphitrite</text:a> </text:p>
                    </text:list-item>
                    <text:list-item>
                      <text:p text:style-name="P9"><text:a xlink:type="simple" xlink:href="https://nl.wikipedia.org/wiki/Arethusa_(nimf)" text:style-name="Internet_20_link" text:visited-style-name="Visited_20_Internet_20_Link">Arethusa</text:a> </text:p>
                    </text:list-item>
                    <text:list-item>
                      <text:p text:style-name="P9"><text:a xlink:type="simple" xlink:href="https://nl.wikipedia.org/wiki/Galatea_(nimf)?action=edit&amp;redlink=1" text:style-name="Internet_20_link" text:visited-style-name="Visited_20_Internet_20_Link">Galatea</text:a> </text:p>
                    </text:list-item>
                    <text:list-item>
                      <text:p text:style-name="P9"><text:a xlink:type="simple" xlink:href="https://nl.wikipedia.org/wiki/Lotis?action=edit&amp;redlink=1" text:style-name="Internet_20_link" text:visited-style-name="Visited_20_Internet_20_Link">Lotis</text:a> </text:p>
                    </text:list-item>
                    <text:list-item>
                      <text:p text:style-name="P9"><text:a xlink:type="simple" xlink:href="https://nl.wikipedia.org/wiki/Lycorias?action=edit&amp;redlink=1" text:style-name="Internet_20_link" text:visited-style-name="Visited_20_Internet_20_Link">Lycorias</text:a> </text:p>
                    </text:list-item>
                    <text:list-item>
                      <text:p text:style-name="P9"><text:a xlink:type="simple" xlink:href="https://nl.wikipedia.org/wiki/Panopea" text:style-name="Internet_20_link" text:visited-style-name="Visited_20_Internet_20_Link">Panopea</text:a> </text:p>
                    </text:list-item>
                    <text:list-item>
                      <text:p text:style-name="P9"><text:a xlink:type="simple" xlink:href="https://nl.wikipedia.org/wiki/Pherusa?action=edit&amp;redlink=1" text:style-name="Internet_20_link" text:visited-style-name="Visited_20_Internet_20_Link">Pherusa</text:a> </text:p>
                    </text:list-item>
                    <text:list-item>
                      <text:p text:style-name="P9"><text:a xlink:type="simple" xlink:href="https://nl.wikipedia.org/wiki/Psamathe_(mythologie)" text:style-name="Internet_20_link" text:visited-style-name="Visited_20_Internet_20_Link">Psamathe</text:a> </text:p>
                    </text:list-item>
                    <text:list-item>
                      <text:p text:style-name="P9"><text:a xlink:type="simple" xlink:href="https://nl.wikipedia.org/wiki/Thetis_(mythologie)" text:style-name="Internet_20_link" text:visited-style-name="Visited_20_Internet_20_Link">Thetis</text:a> </text:p>
                    </text:list-item>
                    <text:list-item>
                      <text:p text:style-name="P9"><text:a xlink:type="simple" xlink:href="https://nl.wikipedia.org/wiki/Thoosa" text:style-name="Internet_20_link" text:visited-style-name="Visited_20_Internet_20_Link">Thoosa</text:a></text:p>
                    </text:list-item>
                  </text:list>
                </text:list-item>
              </text:list>
            </text:list-item>
            <text:list-item>
              <text:p text:style-name="P9"><text:a xlink:type="simple" xlink:href="https://nl.wikipedia.org/wiki/Okeanos_(god)" text:style-name="Internet_20_link" text:visited-style-name="Visited_20_Internet_20_Link">Oceanus</text:a> (de oceaan) </text:p>
              <text:list>
                <text:list-item>
                  <text:p text:style-name="P9">De Oceaniden (Voor een uitgebreidere lijst, zie <text:a xlink:type="simple" xlink:href="https://nl.wikipedia.org/wiki/Oceaniden" text:style-name="Internet_20_link" text:visited-style-name="Visited_20_Internet_20_Link">Oceaniden</text:a>) </text:p>
                  <text:list>
                    <text:list-item>
                      <text:p text:style-name="P9"><text:a xlink:type="simple" xlink:href="https://nl.wikipedia.org/wiki/Acheloüs_(mythologie)" text:style-name="Internet_20_link" text:visited-style-name="Visited_20_Internet_20_Link">Acheloüs</text:a> </text:p>
                    </text:list-item>
                    <text:list-item>
                      <text:p text:style-name="P9"><text:a xlink:type="simple" xlink:href="https://nl.wikipedia.org/wiki/Acheron_(mythologie)" text:style-name="Internet_20_link" text:visited-style-name="Visited_20_Internet_20_Link">Acheron</text:a> </text:p>
                    </text:list-item>
                    <text:list-item>
                      <text:p text:style-name="P9"><text:a xlink:type="simple" xlink:href="https://nl.wikipedia.org/wiki/Alpheüs_(mythologie)" text:style-name="Internet_20_link" text:visited-style-name="Visited_20_Internet_20_Link">Alpheus</text:a> </text:p>
                    </text:list-item>
                    <text:list-item>
                      <text:p text:style-name="P9"><text:a xlink:type="simple" xlink:href="https://nl.wikipedia.org/wiki/Amalthea_(mythologie)" text:style-name="Internet_20_link" text:visited-style-name="Visited_20_Internet_20_Link">Amalthea</text:a> </text:p>
                    </text:list-item>
                    <text:list-item>
                      <text:p text:style-name="P9"><text:a xlink:type="simple" xlink:href="https://nl.wikipedia.org/wiki/Amphitrite_(mythologie)" text:style-name="Internet_20_link" text:visited-style-name="Visited_20_Internet_20_Link">Amphitrite</text:a> </text:p>
                    </text:list-item>
                    <text:list-item>
                      <text:p text:style-name="P9"><text:a xlink:type="simple" xlink:href="https://nl.wikipedia.org/wiki/Asia_(mythologie)" text:style-name="Internet_20_link" text:visited-style-name="Visited_20_Internet_20_Link">Asia</text:a> </text:p>
                    </text:list-item>
                    <text:list-item>
                      <text:p text:style-name="P9"><text:a xlink:type="simple" xlink:href="https://nl.wikipedia.org/wiki/Asopus" text:style-name="Internet_20_link" text:visited-style-name="Visited_20_Internet_20_Link">Asopus</text:a> </text:p>
                    </text:list-item>
                    <text:list-item>
                      <text:p text:style-name="P9"><text:a xlink:type="simple" xlink:href="https://nl.wikipedia.org/wiki/Callirhoë?action=edit&amp;redlink=1" text:style-name="Internet_20_link" text:visited-style-name="Visited_20_Internet_20_Link">Callirhoë</text:a> </text:p>
                    </text:list-item>
                    <text:list-item>
                      <text:p text:style-name="P9"><text:a xlink:type="simple" xlink:href="https://nl.wikipedia.org/wiki/Catillus?action=edit&amp;redlink=1" text:style-name="Internet_20_link" text:visited-style-name="Visited_20_Internet_20_Link">Catillus</text:a> </text:p>
                    </text:list-item>
                    <text:list-item>
                      <text:p text:style-name="P9"><text:a xlink:type="simple" xlink:href="https://nl.wikipedia.org/wiki/Cebren" text:style-name="Internet_20_link" text:visited-style-name="Visited_20_Internet_20_Link">Cebren</text:a> </text:p>
                    </text:list-item>
                    <text:list-item>
                      <text:p text:style-name="P9"><text:a xlink:type="simple" xlink:href="https://nl.wikipedia.org/wiki/Cephissus_(mythologie)" text:style-name="Internet_20_link" text:visited-style-name="Visited_20_Internet_20_Link">Cephissus</text:a> </text:p>
                    </text:list-item>
                    <text:list-item>
                      <text:p text:style-name="P9"><text:a xlink:type="simple" xlink:href="https://nl.wikipedia.org/wiki/Circe_(mythologie)" text:style-name="Internet_20_link" text:visited-style-name="Visited_20_Internet_20_Link">Circe</text:a> </text:p>
                    </text:list-item>
                    <text:list-item>
                      <text:p text:style-name="P9"><text:a xlink:type="simple" xlink:href="https://nl.wikipedia.org/wiki/Clymene_(mythologie)" text:style-name="Internet_20_link" text:visited-style-name="Visited_20_Internet_20_Link">Clymene</text:a> </text:p>
                    </text:list-item>
                    <text:list-item>
                      <text:p text:style-name="P9"><text:a xlink:type="simple" xlink:href="https://nl.wikipedia.org/wiki/Crinisus" text:style-name="Internet_20_link" text:visited-style-name="Visited_20_Internet_20_Link">Crinisus</text:a> </text:p>
                    </text:list-item>
                    <text:list-item>
                      <text:p text:style-name="P9"><text:a xlink:type="simple" xlink:href="https://nl.wikipedia.org/wiki/Theia_(mythologie)" text:style-name="Internet_20_link" text:visited-style-name="Visited_20_Internet_20_Link">Dione</text:a> </text:p>
                    </text:list-item>
                    <text:list-item>
                      <text:p text:style-name="P9"><text:a xlink:type="simple" xlink:href="https://nl.wikipedia.org/wiki/Doris_(mythologie)" text:style-name="Internet_20_link" text:visited-style-name="Visited_20_Internet_20_Link">Doris</text:a> </text:p>
                    </text:list-item>
                    <text:list-item>
                      <text:p text:style-name="P9"><text:a xlink:type="simple" xlink:href="https://nl.wikipedia.org/wiki/Elektra_(mythologie)" text:style-name="Internet_20_link" text:visited-style-name="Visited_20_Internet_20_Link">Elektra</text:a> </text:p>
                    </text:list-item>
                    <text:list-item>
                      <text:p text:style-name="P9"><text:a xlink:type="simple" xlink:href="https://nl.wikipedia.org/wiki/Enipeus" text:style-name="Internet_20_link" text:visited-style-name="Visited_20_Internet_20_Link">Enipeus</text:a> </text:p>
                    </text:list-item>
                    <text:list-item>
                      <text:p text:style-name="P9"><text:a xlink:type="simple" xlink:href="https://nl.wikipedia.org/wiki/Eurynome_(mythologie)" text:style-name="Internet_20_link" text:visited-style-name="Visited_20_Internet_20_Link">Eurynome</text:a> </text:p>
                    </text:list-item>
                    <text:list-item>
                      <text:p text:style-name="P9"><text:a xlink:type="simple" xlink:href="https://nl.wikipedia.org/wiki/Inachus_(mythologie)" text:style-name="Internet_20_link" text:visited-style-name="Visited_20_Internet_20_Link">Inachus</text:a> </text:p>
                    </text:list-item>
                    <text:list-item>
                      <text:p text:style-name="P9"><text:a xlink:type="simple" xlink:href="https://nl.wikipedia.org/wiki/Lysithea_(mythologie)?action=edit&amp;redlink=1" text:style-name="Internet_20_link" text:visited-style-name="Visited_20_Internet_20_Link">Lysithea</text:a> </text:p>
                    </text:list-item>
                    <text:list-item>
                      <text:p text:style-name="P9"><text:a xlink:type="simple" xlink:href="https://nl.wikipedia.org/wiki/Melia_(mythologie)" text:style-name="Internet_20_link" text:visited-style-name="Visited_20_Internet_20_Link">Melia</text:a> </text:p>
                    </text:list-item>
                    <text:list-item>
                      <text:p text:style-name="P9"><text:a xlink:type="simple" xlink:href="https://nl.wikipedia.org/wiki/Meliboea_(Oceanide)?action=edit&amp;redlink=1" text:style-name="Internet_20_link" text:visited-style-name="Visited_20_Internet_20_Link">Meliboea</text:a> </text:p>
                    </text:list-item>
                    <text:list-item>
                      <text:p text:style-name="P9"><text:a xlink:type="simple" xlink:href="https://nl.wikipedia.org/wiki/Merope_(Oceanide)?action=edit&amp;redlink=1" text:style-name="Internet_20_link" text:visited-style-name="Visited_20_Internet_20_Link">Merope</text:a> </text:p>
                    </text:list-item>
                    <text:list-item>
                      <text:p text:style-name="P9"><text:a xlink:type="simple" xlink:href="https://nl.wikipedia.org/wiki/Nilus_(mythologie)" text:style-name="Internet_20_link" text:visited-style-name="Visited_20_Internet_20_Link">Nilus</text:a> </text:p>
                    </text:list-item>
                    <text:list-item>
                      <text:p text:style-name="P9"><text:a xlink:type="simple" xlink:href="https://nl.wikipedia.org/wiki/Peneus_(mythologie)" text:style-name="Internet_20_link" text:visited-style-name="Visited_20_Internet_20_Link">Peneus</text:a> </text:p>
                    </text:list-item>
                    <text:list-item>
                      <text:p text:style-name="P9"><text:a xlink:type="simple" xlink:href="https://nl.wikipedia.org/wiki/Perseïs" text:style-name="Internet_20_link" text:visited-style-name="Visited_20_Internet_20_Link">Perseïs</text:a> </text:p>
                    </text:list-item>
                    <text:list-item>
                      <text:p text:style-name="P9"><text:a xlink:type="simple" xlink:href="https://nl.wikipedia.org/wiki/Philyra_(mythologie)" text:style-name="Internet_20_link" text:visited-style-name="Visited_20_Internet_20_Link">Philyra</text:a> </text:p>
                    </text:list-item>
                    <text:list-item>
                      <text:p text:style-name="P9"><text:a xlink:type="simple" xlink:href="https://nl.wikipedia.org/wiki/Pleione_(mythologie)" text:style-name="Internet_20_link" text:visited-style-name="Visited_20_Internet_20_Link">Pleione</text:a> </text:p>
                    </text:list-item>
                    <text:list-item>
                      <text:p text:style-name="P9"><text:a xlink:type="simple" xlink:href="https://nl.wikipedia.org/wiki/Rhode_(mythologie)" text:style-name="Internet_20_link" text:visited-style-name="Visited_20_Internet_20_Link">Rhode</text:a> </text:p>
                    </text:list-item>
                    <text:list-item>
                      <text:p text:style-name="P9"><text:a xlink:type="simple" xlink:href="https://nl.wikipedia.org/wiki/Skamandros" text:style-name="Internet_20_link" text:visited-style-name="Visited_20_Internet_20_Link">Skamandros</text:a> </text:p>
                    </text:list-item>
                    <text:list-item>
                      <text:p text:style-name="P9"><text:a xlink:type="simple" xlink:href="https://nl.wikipedia.org/wiki/Telesto_(mythologie)" text:style-name="Internet_20_link" text:visited-style-name="Visited_20_Internet_20_Link">Telesto</text:a> </text:p>
                    </text:list-item>
                    <text:list-item>
                      <text:p text:style-name="P9"><text:a xlink:type="simple" xlink:href="https://nl.wikipedia.org/wiki/Tyche_(mythologie)" text:style-name="Internet_20_link" text:visited-style-name="Visited_20_Internet_20_Link">Tyche</text:a></text:p>
                    </text:list-item>
                  </text:list>
                </text:list-item>
              </text:list>
            </text:list-item>
            <text:list-item>
              <text:p text:style-name="P9"><text:a xlink:type="simple" xlink:href="https://nl.wikipedia.org/wiki/Palaemon_(mythologie)" text:style-name="Internet_20_link" text:visited-style-name="Visited_20_Internet_20_Link">Palaemon</text:a> </text:p>
            </text:list-item>
            <text:list-item>
              <text:p text:style-name="P9"><text:a xlink:type="simple" xlink:href="https://nl.wikipedia.org/wiki/Phorcys" text:style-name="Internet_20_link" text:visited-style-name="Visited_20_Internet_20_Link">Phorcys</text:a> </text:p>
            </text:list-item>
            <text:list-item>
              <text:p text:style-name="P9"><text:a xlink:type="simple" xlink:href="https://nl.wikipedia.org/wiki/Poseidon_(mythologie)" text:style-name="Internet_20_link" text:visited-style-name="Visited_20_Internet_20_Link">Poseidon</text:a> </text:p>
            </text:list-item>
            <text:list-item>
              <text:p text:style-name="P9"><text:a xlink:type="simple" xlink:href="https://nl.wikipedia.org/wiki/Proteus_(mythologie)" text:style-name="Internet_20_link" text:visited-style-name="Visited_20_Internet_20_Link">Proteus</text:a> </text:p>
            </text:list-item>
            <text:list-item>
              <text:p text:style-name="P9"><text:a xlink:type="simple" xlink:href="https://nl.wikipedia.org/wiki/Thalassa_(mythologie)" text:style-name="Internet_20_link" text:visited-style-name="Visited_20_Internet_20_Link">Thalassa</text:a> </text:p>
            </text:list-item>
            <text:list-item>
              <text:p text:style-name="P9"><text:a xlink:type="simple" xlink:href="https://nl.wikipedia.org/wiki/Thetis_(mythologie)" text:style-name="Internet_20_link" text:visited-style-name="Visited_20_Internet_20_Link">Thetis</text:a> </text:p>
            </text:list-item>
            <text:list-item>
              <text:p text:style-name="P9"><text:a xlink:type="simple" xlink:href="https://nl.wikipedia.org/wiki/Tethys_(mythologie)" text:style-name="Internet_20_link" text:visited-style-name="Visited_20_Internet_20_Link">Thetys</text:a> </text:p>
            </text:list-item>
            <text:list-item>
              <text:p text:style-name="P10"><text:a xlink:type="simple" xlink:href="https://nl.wikipedia.org/wiki/Triton_(mythologie)" text:style-name="Internet_20_link" text:visited-style-name="Visited_20_Internet_20_Link">Triton</text:a></text:p>
            </text:list-item>
          </text:list>
          <text:h text:style-name="P3" text:outline-level="2"><text:bookmark text:name="Windgoden_.28Anemoi.29"/><text:bookmark text:name="Windgoden_(Anemoi)"/>Windgoden (<text:bookmark text:name="mwRQ"/><text:a xlink:type="simple" xlink:href="https://nl.wikipedia.org/wiki/Anemoi" text:style-name="Internet_20_link" text:visited-style-name="Visited_20_Internet_20_Link">Anemoi</text:a>)</text:h>
          <text:list text:style-name="L4">
            <text:list-item>
              <text:p text:style-name="P11"><text:a xlink:type="simple" xlink:href="https://nl.wikipedia.org/wiki/Aeolus_(mythologie)" text:style-name="Internet_20_link" text:visited-style-name="Visited_20_Internet_20_Link"><text:bookmark text:name="mwSA"/><text:bookmark text:name="mwRw"/><text:bookmark text:name="mwRg"/>Aeolus</text:a> (de wind) </text:p>
            </text:list-item>
            <text:list-item>
              <text:p text:style-name="P11"><text:a xlink:type="simple" xlink:href="https://nl.wikipedia.org/wiki/Boreas_(god)" text:style-name="Internet_20_link" text:visited-style-name="Visited_20_Internet_20_Link"><text:bookmark text:name="mwSg"/><text:bookmark text:name="mwSQ"/>Boreas</text:a> (de noordenwind) </text:p>
            </text:list-item>
            <text:list-item>
              <text:p text:style-name="P11"><text:a xlink:type="simple" xlink:href="https://nl.wikipedia.org/wiki/Euros_(god)" text:style-name="Internet_20_link" text:visited-style-name="Visited_20_Internet_20_Link"><text:bookmark text:name="mwTA"/><text:bookmark text:name="mwSw"/>Euros</text:a> (de oostenwind) </text:p>
            </text:list-item>
            <text:list-item>
              <text:p text:style-name="P11"><text:a xlink:type="simple" xlink:href="https://nl.wikipedia.org/wiki/Notos" text:style-name="Internet_20_link" text:visited-style-name="Visited_20_Internet_20_Link"><text:bookmark text:name="mwTg"/><text:bookmark text:name="mwTQ"/>Notos</text:a> (de zuidenwind) </text:p>
            </text:list-item>
            <text:list-item>
              <text:p text:style-name="P12"><text:a xlink:type="simple" xlink:href="https://nl.wikipedia.org/wiki/Zephyros" text:style-name="Internet_20_link" text:visited-style-name="Visited_20_Internet_20_Link"><text:bookmark text:name="mwUA"/><text:bookmark text:name="mwTw"/>Zephyros</text:a> (de westenwind)</text:p>
            </text:list-item>
          </text:list>
          <text:h text:style-name="P3" text:outline-level="2"><text:bookmark text:name="Gepersonifieerde_concepten"/>Gepersonifieerde concepten</text:h>
          <text:section text:style-name="Sect1" text:name="mwUw">
            <text:list text:style-name="L5">
              <text:list-item>
                <text:p text:style-name="P13"><text:a xlink:type="simple" xlink:href="https://nl.wikipedia.org/wiki/Apate" text:style-name="Internet_20_link" text:visited-style-name="Visited_20_Internet_20_Link">Apate</text:a> (misleiding) </text:p>
              </text:list-item>
              <text:list-item>
                <text:p text:style-name="P14"><text:a xlink:type="simple" xlink:href="https://nl.wikipedia.org/wiki/Bia_(godin)" text:style-name="Internet_20_link" text:visited-style-name="Visited_20_Internet_20_Link">Bia</text:a> (geweld) </text:p>
              </text:list-item>
              <text:list-item>
                <text:p text:style-name="P14"><text:a xlink:type="simple" xlink:href="https://nl.wikipedia.org/wiki/Chloris_(nimf)" text:style-name="Internet_20_link" text:visited-style-name="Visited_20_Internet_20_Link">Chloris</text:a> (natuur) </text:p>
              </text:list-item>
              <text:list-item>
                <text:p text:style-name="P14"><text:a xlink:type="simple" xlink:href="https://nl.wikipedia.org/wiki/Chronos" text:style-name="Internet_20_link" text:visited-style-name="Visited_20_Internet_20_Link"><text:span text:style-name="T2">Chronos</text:span></text:a> (tijd) </text:p>
              </text:list-item>
              <text:list-item>
                <text:p text:style-name="P14"><text:a xlink:type="simple" xlink:href="https://nl.wikipedia.org/wiki/Eris_(mythologie)" text:style-name="Internet_20_link" text:visited-style-name="Visited_20_Internet_20_Link">Eris</text:a> (twist) </text:p>
              </text:list-item>
              <text:list-item>
                <text:p text:style-name="P14"><text:a xlink:type="simple" xlink:href="https://nl.wikipedia.org/wiki/Eros_(god)" text:style-name="Internet_20_link" text:visited-style-name="Visited_20_Internet_20_Link"><text:span text:style-name="T2">Eros</text:span></text:a><text:span text:style-name="T2"> (liefde) </text:span></text:p>
              </text:list-item>
              <text:list-item>
                <text:p text:style-name="P14"><text:a xlink:type="simple" xlink:href="https://nl.wikipedia.org/wiki/Hybris_(Oudgrieks)" text:style-name="Internet_20_link" text:visited-style-name="Visited_20_Internet_20_Link">Hybris</text:a> (overmoedigheid) </text:p>
              </text:list-item>
              <text:list-item>
                <text:p text:style-name="P14"><text:a xlink:type="simple" xlink:href="https://nl.wikipedia.org/wiki/Hygieia" text:style-name="Internet_20_link" text:visited-style-name="Visited_20_Internet_20_Link">Hygieia</text:a> (gezondheid) </text:p>
              </text:list-item>
              <text:list-item>
                <text:p text:style-name="P14"><text:a xlink:type="simple" xlink:href="https://nl.wikipedia.org/wiki/Hypnos" text:style-name="Internet_20_link" text:visited-style-name="Visited_20_Internet_20_Link"><text:span text:style-name="T2">Hypnos</text:span></text:a> (slaap) </text:p>
              </text:list-item>
              <text:list-item>
                <text:p text:style-name="P14"><text:a xlink:type="simple" xlink:href="https://nl.wikipedia.org/wiki/Kratos" text:style-name="Internet_20_link" text:visited-style-name="Visited_20_Internet_20_Link">Kratos</text:a> (kracht) </text:p>
              </text:list-item>
              <text:list-item>
                <text:p text:style-name="P14"><text:a xlink:type="simple" xlink:href="https://nl.wikipedia.org/wiki/Metis_(mythologie)" text:style-name="Internet_20_link" text:visited-style-name="Visited_20_Internet_20_Link">Metis</text:a> (wijsheid) </text:p>
              </text:list-item>
              <text:list-item>
                <text:p text:style-name="P14"><text:a xlink:type="simple" xlink:href="https://nl.wikipedia.org/wiki/Nikè" text:style-name="Internet_20_link" text:visited-style-name="Visited_20_Internet_20_Link">Nikè</text:a> (overwinning) </text:p>
              </text:list-item>
              <text:list-item>
                <text:p text:style-name="P14"><text:a xlink:type="simple" xlink:href="https://nl.wikipedia.org/wiki/Nemesis_(mythologie)" text:style-name="Internet_20_link" text:visited-style-name="Visited_20_Internet_20_Link"><text:span text:style-name="T2">Nemesis</text:span></text:a><text:span text:style-name="T2"> </text:span>(wraak) </text:p>
              </text:list-item>
              <text:list-item>
                <text:p text:style-name="P14"><text:a xlink:type="simple" xlink:href="https://nl.wikipedia.org/wiki/Philotes" text:style-name="Internet_20_link" text:visited-style-name="Visited_20_Internet_20_Link">Philotes</text:a> (affectie) </text:p>
              </text:list-item>
              <text:list-item>
                <text:p text:style-name="P14"><text:a xlink:type="simple" xlink:href="https://nl.wikipedia.org/wiki/Thanatos" text:style-name="Internet_20_link" text:visited-style-name="Visited_20_Internet_20_Link"><text:span text:style-name="T2">Thanatos</text:span></text:a><text:span text:style-name="T2"> </text:span>(de dood) </text:p>
              </text:list-item>
              <text:list-item>
                <text:p text:style-name="P14"><text:a xlink:type="simple" xlink:href="https://nl.wikipedia.org/wiki/Themis_(mythologie)" text:style-name="Internet_20_link" text:visited-style-name="Visited_20_Internet_20_Link">Themis</text:a> (orde) </text:p>
              </text:list-item>
              <text:list-item>
                <text:p text:style-name="P15"><text:a xlink:type="simple" xlink:href="https://nl.wikipedia.org/wiki/Zelus" text:style-name="Internet_20_link" text:visited-style-name="Visited_20_Internet_20_Link">Zelus</text:a> (ijver)</text:p>
              </text:list-item>
            </text:list>
            <text:p text:style-name="P7"><text:bookmark text:name="mwVA"/>en:</text:p>
            <text:section text:style-name="Sect1" text:name="mwVg">
              <text:list text:style-name="L6">
                <text:list-item>
                  <text:p text:style-name="P16">de <text:a xlink:type="simple" xlink:href="https://nl.wikipedia.org/wiki/Gratiën" text:style-name="Internet_20_link" text:visited-style-name="Visited_20_Internet_20_Link">Chariten (gratiën)</text:a> </text:p>
                  <text:list>
                    <text:list-item>
                      <text:p text:style-name="P17"><text:a xlink:type="simple" xlink:href="https://nl.wikipedia.org/wiki/Aglaia_(mythologie)" text:style-name="Internet_20_link" text:visited-style-name="Visited_20_Internet_20_Link">Aglaia</text:a> </text:p>
                    </text:list-item>
                    <text:list-item>
                      <text:p text:style-name="P17"><text:a xlink:type="simple" xlink:href="https://nl.wikipedia.org/wiki/Euphrosyne_(mythologie)" text:style-name="Internet_20_link" text:visited-style-name="Visited_20_Internet_20_Link">Euphrosyne</text:a> </text:p>
                    </text:list-item>
                    <text:list-item>
                      <text:p text:style-name="P17"><text:a xlink:type="simple" xlink:href="https://nl.wikipedia.org/wiki/Thaleia_(mythologie)" text:style-name="Internet_20_link" text:visited-style-name="Visited_20_Internet_20_Link">Thaleia</text:a> of <text:a xlink:type="simple" xlink:href="https://nl.wikipedia.org/wiki/Cleta_(mythologie)" text:style-name="Internet_20_link" text:visited-style-name="Visited_20_Internet_20_Link">Cleta</text:a></text:p>
                    </text:list-item>
                  </text:list>
                </text:list-item>
                <text:list-item>
                  <text:p text:style-name="P17">de <text:a xlink:type="simple" xlink:href="https://nl.wikipedia.org/wiki/Horen_(mythologie)" text:style-name="Internet_20_link" text:visited-style-name="Visited_20_Internet_20_Link">Horen</text:a> (seizoenen) </text:p>
                  <text:list>
                    <text:list-item>
                      <text:p text:style-name="P17"><text:a xlink:type="simple" xlink:href="https://nl.wikipedia.org/wiki/Auxo" text:style-name="Internet_20_link" text:visited-style-name="Visited_20_Internet_20_Link">Auxo</text:a> (zomer) </text:p>
                    </text:list-item>
                    <text:list-item>
                      <text:p text:style-name="P17"><text:a xlink:type="simple" xlink:href="https://nl.wikipedia.org/wiki/Carpo_(mythologie)" text:style-name="Internet_20_link" text:visited-style-name="Visited_20_Internet_20_Link">Carpo</text:a> (winter) </text:p>
                    </text:list-item>
                    <text:list-item>
                      <text:p text:style-name="P17"><text:a xlink:type="simple" xlink:href="https://nl.wikipedia.org/wiki/Flacco?action=edit&amp;redlink=1" text:style-name="Internet_20_link" text:visited-style-name="Visited_20_Internet_20_Link">Flacco</text:a> of <text:a xlink:type="simple" xlink:href="https://nl.wikipedia.org/wiki/Flacca?action=edit&amp;redlink=1" text:style-name="Internet_20_link" text:visited-style-name="Visited_20_Internet_20_Link">Flacca</text:a> (herfst) </text:p>
                    </text:list-item>
                    <text:list-item>
                      <text:p text:style-name="P17"><text:a xlink:type="simple" xlink:href="https://nl.wikipedia.org/wiki/Thallo" text:style-name="Internet_20_link" text:visited-style-name="Visited_20_Internet_20_Link"><text:soft-page-break/>Thallo</text:a> (lente)</text:p>
                    </text:list-item>
                  </text:list>
                </text:list-item>
                <text:list-item>
                  <text:p text:style-name="P17">de <text:a xlink:type="simple" xlink:href="https://nl.wikipedia.org/wiki/Schikgodinnen" text:style-name="Internet_20_link" text:visited-style-name="Visited_20_Internet_20_Link">Moirae</text:a> (lot) </text:p>
                  <text:list>
                    <text:list-item>
                      <text:p text:style-name="P17"><text:a xlink:type="simple" xlink:href="https://nl.wikipedia.org/wiki/Atropos" text:style-name="Internet_20_link" text:visited-style-name="Visited_20_Internet_20_Link">Atropos</text:a> </text:p>
                    </text:list-item>
                    <text:list-item>
                      <text:p text:style-name="P17"><text:a xlink:type="simple" xlink:href="https://nl.wikipedia.org/wiki/Klotho" text:style-name="Internet_20_link" text:visited-style-name="Visited_20_Internet_20_Link">Clotho</text:a> </text:p>
                    </text:list-item>
                    <text:list-item>
                      <text:p text:style-name="P17"><text:a xlink:type="simple" xlink:href="https://nl.wikipedia.org/wiki/Lachesis_(mythologie)" text:style-name="Internet_20_link" text:visited-style-name="Visited_20_Internet_20_Link">Lachesis</text:a></text:p>
                    </text:list-item>
                  </text:list>
                </text:list-item>
                <text:list-item>
                  <text:p text:style-name="P17">de <text:a xlink:type="simple" xlink:href="https://nl.wikipedia.org/wiki/Muzen" text:style-name="Internet_20_link" text:visited-style-name="Visited_20_Internet_20_Link">Muzen</text:a> (kunst) </text:p>
                  <text:list>
                    <text:list-item>
                      <text:p text:style-name="P17"><text:a xlink:type="simple" xlink:href="https://nl.wikipedia.org/wiki/Clio_(muze)" text:style-name="Internet_20_link" text:visited-style-name="Visited_20_Internet_20_Link">Clio</text:a> (de geschiedschrijving) </text:p>
                    </text:list-item>
                    <text:list-item>
                      <text:p text:style-name="P17"><text:a xlink:type="simple" xlink:href="https://nl.wikipedia.org/wiki/Erato_(muze)" text:style-name="Internet_20_link" text:visited-style-name="Visited_20_Internet_20_Link">Erato</text:a> (de liefdespoëzie) </text:p>
                    </text:list-item>
                    <text:list-item>
                      <text:p text:style-name="P17"><text:a xlink:type="simple" xlink:href="https://nl.wikipedia.org/wiki/Euterpe_(muze)" text:style-name="Internet_20_link" text:visited-style-name="Visited_20_Internet_20_Link">Euterpe</text:a> (het fluitspel) </text:p>
                    </text:list-item>
                    <text:list-item>
                      <text:p text:style-name="P17"><text:a xlink:type="simple" xlink:href="https://nl.wikipedia.org/wiki/Kalliope_(muze)" text:style-name="Internet_20_link" text:visited-style-name="Visited_20_Internet_20_Link">Kalliope</text:a> (de epische poëzie) </text:p>
                    </text:list-item>
                    <text:list-item>
                      <text:p text:style-name="P17"><text:a xlink:type="simple" xlink:href="https://nl.wikipedia.org/wiki/Kalypso" text:style-name="Internet_20_link" text:visited-style-name="Visited_20_Internet_20_Link">Kalypso</text:a> </text:p>
                    </text:list-item>
                    <text:list-item>
                      <text:p text:style-name="P17"><text:a xlink:type="simple" xlink:href="https://nl.wikipedia.org/wiki/Melpomene_(muze)" text:style-name="Internet_20_link" text:visited-style-name="Visited_20_Internet_20_Link">Melpomene</text:a> (de tragedie) </text:p>
                    </text:list-item>
                    <text:list-item>
                      <text:p text:style-name="P17"><text:a xlink:type="simple" xlink:href="https://nl.wikipedia.org/wiki/Polyhymnia_(muze)" text:style-name="Internet_20_link" text:visited-style-name="Visited_20_Internet_20_Link">Polyhymnia</text:a> (het gewijde lied) </text:p>
                    </text:list-item>
                    <text:list-item>
                      <text:p text:style-name="P17"><text:a xlink:type="simple" xlink:href="https://nl.wikipedia.org/wiki/Terpsichore" text:style-name="Internet_20_link" text:visited-style-name="Visited_20_Internet_20_Link">Terpsichore</text:a> (de lyriek) </text:p>
                    </text:list-item>
                    <text:list-item>
                      <text:p text:style-name="P17"><text:a xlink:type="simple" xlink:href="https://nl.wikipedia.org/wiki/Thaleia_(mythologie)" text:style-name="Internet_20_link" text:visited-style-name="Visited_20_Internet_20_Link">Thalia</text:a> (de komedie) </text:p>
                    </text:list-item>
                    <text:list-item>
                      <text:p text:style-name="P18"><text:a xlink:type="simple" xlink:href="https://nl.wikipedia.org/wiki/Urania_(muze)" text:style-name="Internet_20_link" text:visited-style-name="Visited_20_Internet_20_Link">Urania</text:a> (de sterrenkunde)</text:p>
                    </text:list-item>
                  </text:list>
                </text:list-item>
              </text:list>
              <text:h text:style-name="P3" text:outline-level="2"><text:a xlink:type="simple" xlink:href="https://nl.wikipedia.org/wiki/Phorceïden" text:style-name="Internet_20_link" text:visited-style-name="Visited_20_Internet_20_Link"><text:bookmark text:name="mwWA"/><text:bookmark text:name="Phorce.C3.AFden"/><text:bookmark text:name="Phorceïden"/>Phorceïden</text:a></text:h>
              <text:list text:style-name="L7">
                <text:list-item>
                  <text:p text:style-name="P19"><text:a xlink:type="simple" xlink:href="https://nl.wikipedia.org/wiki/Charybdis_(mythologie)" text:style-name="Internet_20_link" text:visited-style-name="Visited_20_Internet_20_Link"><text:bookmark text:name="mwWw"/><text:bookmark text:name="mwWg"/><text:bookmark text:name="mwWQ"/>Charybdis</text:a> </text:p>
                </text:list-item>
                <text:list-item>
                  <text:p text:style-name="P19"><text:bookmark text:name="mwXA"/>De <text:bookmark text:name="mwXQ"/><text:a xlink:type="simple" xlink:href="https://nl.wikipedia.org/wiki/Graeae" text:style-name="Internet_20_link" text:visited-style-name="Visited_20_Internet_20_Link">Graeae</text:a> </text:p>
                  <text:list>
                    <text:list-item>
                      <text:p text:style-name="P19"><text:a xlink:type="simple" xlink:href="https://nl.wikipedia.org/wiki/Deino?action=edit&amp;redlink=1" text:style-name="Internet_20_link" text:visited-style-name="Visited_20_Internet_20_Link"><text:bookmark text:name="mwYA"/><text:bookmark text:name="mwXw"/><text:bookmark text:name="mwXg"/>Deino</text:a> </text:p>
                    </text:list-item>
                    <text:list-item>
                      <text:p text:style-name="P19"><text:a xlink:type="simple" xlink:href="https://nl.wikipedia.org/wiki/Enyo" text:style-name="Internet_20_link" text:visited-style-name="Visited_20_Internet_20_Link"><text:bookmark text:name="mwYg"/><text:bookmark text:name="mwYQ"/>Enyo</text:a> </text:p>
                    </text:list-item>
                    <text:list-item>
                      <text:p text:style-name="P19"><text:a xlink:type="simple" xlink:href="https://nl.wikipedia.org/wiki/Pemphredo?action=edit&amp;redlink=1" text:style-name="Internet_20_link" text:visited-style-name="Visited_20_Internet_20_Link"><text:bookmark text:name="mwZA"/><text:bookmark text:name="mwYw"/>Pemphredo</text:a></text:p>
                    </text:list-item>
                  </text:list>
                </text:list-item>
                <text:list-item>
                  <text:p text:style-name="P19"><text:bookmark text:name="mwZQ"/>De <text:bookmark text:name="mwZg"/><text:a xlink:type="simple" xlink:href="https://nl.wikipedia.org/wiki/Gorgonen_(mythologie)" text:style-name="Internet_20_link" text:visited-style-name="Visited_20_Internet_20_Link">Gorgonen</text:a> </text:p>
                </text:list-item>
                <text:list-item>
                  <text:p text:style-name="P20"><text:a xlink:type="simple" xlink:href="https://nl.wikipedia.org/wiki/Scylla_(nimf)" text:style-name="Internet_20_link" text:visited-style-name="Visited_20_Internet_20_Link"><text:bookmark text:name="mwaA"/><text:bookmark text:name="mwZw"/>Scylla</text:a></text:p>
                </text:list-item>
              </text:list>
              <text:h text:style-name="P3" text:outline-level="2"><text:a xlink:type="simple" xlink:href="https://nl.wikipedia.org/wiki/Nimf_(mythisch_wezen)" text:style-name="Internet_20_link" text:visited-style-name="Visited_20_Internet_20_Link"><text:bookmark text:name="mwag"/><text:bookmark text:name="Nimfen"/>Nimfen</text:a></text:h>
              <text:section text:style-name="Sect1" text:name="mwbA">
                <text:list text:style-name="L8">
                  <text:list-item>
                    <text:p text:style-name="P21"><text:a xlink:type="simple" xlink:href="https://nl.wikipedia.org/wiki/Adrasteia?action=edit&amp;redlink=1" text:style-name="Internet_20_link" text:visited-style-name="Visited_20_Internet_20_Link">Adrasteia</text:a> </text:p>
                  </text:list-item>
                  <text:list-item>
                    <text:p text:style-name="P22"><text:a xlink:type="simple" xlink:href="https://nl.wikipedia.org/wiki/Amphitrite_(mythologie)" text:style-name="Internet_20_link" text:visited-style-name="Visited_20_Internet_20_Link">Amphitrite</text:a> </text:p>
                  </text:list-item>
                  <text:list-item>
                    <text:p text:style-name="P22"><text:a xlink:type="simple" xlink:href="https://nl.wikipedia.org/wiki/Arethusa_(nimf)" text:style-name="Internet_20_link" text:visited-style-name="Visited_20_Internet_20_Link">Arethusa</text:a> </text:p>
                  </text:list-item>
                  <text:list-item>
                    <text:p text:style-name="P22"><text:a xlink:type="simple" xlink:href="https://nl.wikipedia.org/wiki/Kalypso" text:style-name="Internet_20_link" text:visited-style-name="Visited_20_Internet_20_Link">Calypso</text:a> </text:p>
                  </text:list-item>
                  <text:list-item>
                    <text:p text:style-name="P22"><text:a xlink:type="simple" xlink:href="https://nl.wikipedia.org/wiki/Clytia" text:style-name="Internet_20_link" text:visited-style-name="Visited_20_Internet_20_Link">Clytia</text:a> </text:p>
                  </text:list-item>
                  <text:list-item>
                    <text:p text:style-name="P22"><text:a xlink:type="simple" xlink:href="https://nl.wikipedia.org/wiki/Crataeis?action=edit&amp;redlink=1" text:style-name="Internet_20_link" text:visited-style-name="Visited_20_Internet_20_Link">Crataeis</text:a> </text:p>
                  </text:list-item>
                  <text:list-item>
                    <text:p text:style-name="P22"><text:a xlink:type="simple" xlink:href="https://nl.wikipedia.org/wiki/Daphne_(mythologie)" text:style-name="Internet_20_link" text:visited-style-name="Visited_20_Internet_20_Link">Daphne</text:a> </text:p>
                  </text:list-item>
                  <text:list-item>
                    <text:p text:style-name="P22"><text:a xlink:type="simple" xlink:href="https://nl.wikipedia.org/wiki/Dryaden" text:style-name="Internet_20_link" text:visited-style-name="Visited_20_Internet_20_Link">Dryaden</text:a> </text:p>
                  </text:list-item>
                  <text:list-item>
                    <text:p text:style-name="P22"><text:a xlink:type="simple" xlink:href="https://nl.wikipedia.org/wiki/Echo_(mythologie)" text:style-name="Internet_20_link" text:visited-style-name="Visited_20_Internet_20_Link">Echo</text:a> </text:p>
                  </text:list-item>
                  <text:list-item>
                    <text:p text:style-name="P22"><text:a xlink:type="simple" xlink:href="https://nl.wikipedia.org/wiki/Eidyia?action=edit&amp;redlink=1" text:style-name="Internet_20_link" text:visited-style-name="Visited_20_Internet_20_Link">Eidyia</text:a> </text:p>
                  </text:list-item>
                  <text:list-item>
                    <text:p text:style-name="P22"><text:a xlink:type="simple" xlink:href="https://nl.wikipedia.org/wiki/Hamadryaden" text:style-name="Internet_20_link" text:visited-style-name="Visited_20_Internet_20_Link">Hamadryaden</text:a> </text:p>
                  </text:list-item>
                  <text:list-item>
                    <text:p text:style-name="P22">De <text:a xlink:type="simple" xlink:href="https://nl.wikipedia.org/wiki/Naiaden" text:style-name="Internet_20_link" text:visited-style-name="Visited_20_Internet_20_Link">Naiaden</text:a> </text:p>
                  </text:list-item>
                  <text:list-item>
                    <text:p text:style-name="P22">De <text:a xlink:type="simple" xlink:href="https://nl.wikipedia.org/wiki/Nereïden" text:style-name="Internet_20_link" text:visited-style-name="Visited_20_Internet_20_Link">Nereïden</text:a> </text:p>
                  </text:list-item>
                  <text:list-item>
                    <text:p text:style-name="P22">De <text:a xlink:type="simple" xlink:href="https://nl.wikipedia.org/wiki/Oread?action=edit&amp;redlink=1" text:style-name="Internet_20_link" text:visited-style-name="Visited_20_Internet_20_Link">Oreaden</text:a> </text:p>
                  </text:list-item>
                  <text:list-item>
                    <text:p text:style-name="P22">De <text:a xlink:type="simple" xlink:href="https://nl.wikipedia.org/wiki/Hesperiden" text:style-name="Internet_20_link" text:visited-style-name="Visited_20_Internet_20_Link">Hesperiden</text:a> </text:p>
                  </text:list-item>
                  <text:list-item>
                    <text:p text:style-name="P23"><text:a xlink:type="simple" xlink:href="https://nl.wikipedia.org/wiki/Syrinx_(nimf)" text:style-name="Internet_20_link" text:visited-style-name="Visited_20_Internet_20_Link">Syrinx</text:a></text:p>
                  </text:list-item>
                </text:list>
                <text:h text:style-name="P3" text:outline-level="2"><text:a xlink:type="simple" xlink:href="https://nl.wikipedia.org/wiki/Titaan_(mythisch_wezen)" text:style-name="Internet_20_link" text:visited-style-name="Visited_20_Internet_20_Link"><text:bookmark text:name="mwbg"/><text:bookmark text:name="Titanen"/>Titanen</text:a></text:h>
                <text:section text:style-name="Sect1" text:name="mwcA">
                  <text:list text:style-name="L9">
                    <text:list-item>
                      <text:p text:style-name="P24"><text:a xlink:type="simple" xlink:href="https://nl.wikipedia.org/wiki/Asteria" text:style-name="Internet_20_link" text:visited-style-name="Visited_20_Internet_20_Link"><text:span text:style-name="T2">Asteria</text:span></text:a><text:span text:style-name="T2"> </text:span></text:p>
                    </text:list-item>
                    <text:list-item>
                      <text:p text:style-name="P25"><text:a xlink:type="simple" xlink:href="https://nl.wikipedia.org/wiki/Astraeus_(mythologie)" text:style-name="Internet_20_link" text:visited-style-name="Visited_20_Internet_20_Link">Astraeus</text:a> </text:p>
                    </text:list-item>
                    <text:list-item>
                      <text:p text:style-name="P25"><text:a xlink:type="simple" xlink:href="https://nl.wikipedia.org/wiki/Atlas_(mythologie)" text:style-name="Internet_20_link" text:visited-style-name="Visited_20_Internet_20_Link">Atlas</text:a> </text:p>
                    </text:list-item>
                    <text:list-item>
                      <text:p text:style-name="P25"><text:a xlink:type="simple" xlink:href="https://nl.wikipedia.org/wiki/Clymene_(mythologie)" text:style-name="Internet_20_link" text:visited-style-name="Visited_20_Internet_20_Link">Clymene</text:a> </text:p>
                    </text:list-item>
                    <text:list-item>
                      <text:p text:style-name="P25"><text:a xlink:type="simple" xlink:href="https://nl.wikipedia.org/wiki/Koios" text:style-name="Internet_20_link" text:visited-style-name="Visited_20_Internet_20_Link"><text:span text:style-name="T2">Coeus</text:span></text:a><text:span text:style-name="T2"> </text:span></text:p>
                    </text:list-item>
                    <text:list-item>
                      <text:p text:style-name="P25"><text:a xlink:type="simple" xlink:href="https://nl.wikipedia.org/wiki/Crius" text:style-name="Internet_20_link" text:visited-style-name="Visited_20_Internet_20_Link"><text:span text:style-name="T2">Crius</text:span></text:a><text:span text:style-name="T2"> </text:span></text:p>
                    </text:list-item>
                    <text:list-item>
                      <text:p text:style-name="P25"><text:a xlink:type="simple" xlink:href="https://nl.wikipedia.org/wiki/Theia_(mythologie)" text:style-name="Internet_20_link" text:visited-style-name="Visited_20_Internet_20_Link">D<text:span text:style-name="T2">ione</text:span></text:a> </text:p>
                    </text:list-item>
                    <text:list-item>
                      <text:p text:style-name="P25"><text:a xlink:type="simple" xlink:href="https://nl.wikipedia.org/wiki/Epimetheus_(mythologie)" text:style-name="Internet_20_link" text:visited-style-name="Visited_20_Internet_20_Link">Epimetheus</text:a> </text:p>
                    </text:list-item>
                    <text:list-item>
                      <text:p text:style-name="P25"><text:a xlink:type="simple" xlink:href="https://nl.wikipedia.org/wiki/Hekate" text:style-name="Internet_20_link" text:visited-style-name="Visited_20_Internet_20_Link"><text:span text:style-name="T2">Hekate</text:span></text:a><text:span text:style-name="T2"> </text:span></text:p>
                    </text:list-item>
                    <text:list-item>
                      <text:p text:style-name="P25"><text:a xlink:type="simple" xlink:href="https://nl.wikipedia.org/wiki/Helios_(zonnegod)" text:style-name="Internet_20_link" text:visited-style-name="Visited_20_Internet_20_Link">Helios</text:a> (zonnegod, zoon van Hyperion en Theia) </text:p>
                    </text:list-item>
                    <text:list-item>
                      <text:p text:style-name="P25"><text:a xlink:type="simple" xlink:href="https://nl.wikipedia.org/wiki/Hyperion_(mythologie)" text:style-name="Internet_20_link" text:visited-style-name="Visited_20_Internet_20_Link">Hyperion</text:a> </text:p>
                    </text:list-item>
                    <text:list-item>
                      <text:p text:style-name="P25"><text:a xlink:type="simple" xlink:href="https://nl.wikipedia.org/wiki/Iapetus_(mythologie)" text:style-name="Internet_20_link" text:visited-style-name="Visited_20_Internet_20_Link">Iapetus</text:a> </text:p>
                    </text:list-item>
                    <text:list-item>
                      <text:p text:style-name="P25"><text:a xlink:type="simple" xlink:href="https://nl.wikipedia.org/wiki/Kronos" text:style-name="Internet_20_link" text:visited-style-name="Visited_20_Internet_20_Link">Kronos</text:a> (oppertitaan) </text:p>
                    </text:list-item>
                    <text:list-item>
                      <text:p text:style-name="P25"><text:a xlink:type="simple" xlink:href="https://nl.wikipedia.org/wiki/Leto_(mythologie)" text:style-name="Internet_20_link" text:visited-style-name="Visited_20_Internet_20_Link"><text:span text:style-name="T1">Leto</text:span></text:a> </text:p>
                    </text:list-item>
                    <text:list-item>
                      <text:p text:style-name="P25"><text:a xlink:type="simple" xlink:href="https://nl.wikipedia.org/wiki/Menoetius" text:style-name="Internet_20_link" text:visited-style-name="Visited_20_Internet_20_Link">Menoetius</text:a> </text:p>
                    </text:list-item>
                    <text:list-item>
                      <text:p text:style-name="P25"><text:a xlink:type="simple" xlink:href="https://nl.wikipedia.org/wiki/Mnemosyne" text:style-name="Internet_20_link" text:visited-style-name="Visited_20_Internet_20_Link">Mnemosyne</text:a> </text:p>
                    </text:list-item>
                    <text:list-item>
                      <text:p text:style-name="P25"><text:a xlink:type="simple" xlink:href="https://nl.wikipedia.org/wiki/Okeanos_(god)" text:style-name="Internet_20_link" text:visited-style-name="Visited_20_Internet_20_Link">Okeanos</text:a> </text:p>
                    </text:list-item>
                    <text:list-item>
                      <text:p text:style-name="P25"><text:a xlink:type="simple" xlink:href="https://nl.wikipedia.org/wiki/Phoibe" text:style-name="Internet_20_link" text:visited-style-name="Visited_20_Internet_20_Link"><text:span text:style-name="T2">Phoebe</text:span></text:a><text:span text:style-name="T2"> </text:span></text:p>
                    </text:list-item>
                    <text:list-item>
                      <text:p text:style-name="P25"><text:a xlink:type="simple" xlink:href="https://nl.wikipedia.org/wiki/Prometheus_(mythologie)" text:style-name="Internet_20_link" text:visited-style-name="Visited_20_Internet_20_Link">Prometheus</text:a> </text:p>
                    </text:list-item>
                    <text:list-item>
                      <text:p text:style-name="P25"><text:a xlink:type="simple" xlink:href="https://nl.wikipedia.org/wiki/Rhea_(mythologie)" text:style-name="Internet_20_link" text:visited-style-name="Visited_20_Internet_20_Link"><text:span text:style-name="T2">Rhea</text:span></text:a><text:span text:style-name="T2"> </text:span></text:p>
                    </text:list-item>
                    <text:list-item>
                      <text:p text:style-name="P25"><text:a xlink:type="simple" xlink:href="https://nl.wikipedia.org/wiki/Tethys_(mythologie)" text:style-name="Internet_20_link" text:visited-style-name="Visited_20_Internet_20_Link">Tethys</text:a> </text:p>
                    </text:list-item>
                    <text:list-item>
                      <text:p text:style-name="P25"><text:a xlink:type="simple" xlink:href="https://nl.wikipedia.org/wiki/Theia_(mythologie)" text:style-name="Internet_20_link" text:visited-style-name="Visited_20_Internet_20_Link">Theia</text:a> </text:p>
                    </text:list-item>
                    <text:list-item>
                      <text:p text:style-name="P26"><text:a xlink:type="simple" xlink:href="https://nl.wikipedia.org/wiki/Themis_(mythologie)" text:style-name="Internet_20_link" text:visited-style-name="Visited_20_Internet_20_Link">Themis</text:a></text:p>
                    </text:list-item>
                  </text:list>
                  <text:h text:style-name="P3" text:outline-level="2"><text:a xlink:type="simple" xlink:href="https://nl.wikipedia.org/wiki/Cycloop" text:style-name="Internet_20_link" text:visited-style-name="Visited_20_Internet_20_Link"><text:bookmark text:name="mwcg"/><text:bookmark text:name="Cyclopen"/>Cyclopen</text:a></text:h>
                  <text:list text:style-name="L10">
                    <text:list-item>
                      <text:p text:style-name="P27"><text:a xlink:type="simple" xlink:href="https://nl.wikipedia.org/wiki/Arges_(mythologie)" text:style-name="Internet_20_link" text:visited-style-name="Visited_20_Internet_20_Link"><text:bookmark text:name="mwdQ"/><text:bookmark text:name="mwdA"/><text:bookmark text:name="mwcw"/>Arges</text:a> </text:p>
                    </text:list-item>
                    <text:list-item>
                      <text:p text:style-name="P27"><text:a xlink:type="simple" xlink:href="https://nl.wikipedia.org/wiki/Brontes" text:style-name="Internet_20_link" text:visited-style-name="Visited_20_Internet_20_Link"><text:bookmark text:name="mwdw"/><text:bookmark text:name="mwdg"/>Brontes</text:a> </text:p>
                    </text:list-item>
                    <text:list-item>
                      <text:p text:style-name="P27"><text:a xlink:type="simple" xlink:href="https://nl.wikipedia.org/wiki/Steropes" text:style-name="Internet_20_link" text:visited-style-name="Visited_20_Internet_20_Link"><text:bookmark text:name="mweQ"/><text:bookmark text:name="mweA"/>Steropes</text:a> </text:p>
                    </text:list-item>
                    <text:list-item>
                      <text:p text:style-name="P28"><text:a xlink:type="simple" xlink:href="https://nl.wikipedia.org/wiki/Polyphemos_(mythologie)" text:style-name="Internet_20_link" text:visited-style-name="Visited_20_Internet_20_Link"><text:bookmark text:name="mwew"/><text:bookmark text:name="mweg"/>Polyphemos</text:a></text:p>
                    </text:list-item>
                  </text:list>
                  <text:h text:style-name="P3" text:outline-level="2"><text:a xlink:type="simple" xlink:href="https://nl.wikipedia.org/wiki/Hekatoncheiren" text:style-name="Internet_20_link" text:visited-style-name="Visited_20_Internet_20_Link"><text:bookmark text:name="mwfQ"/><text:bookmark text:name="Hekatoncheiren"/>Hekatoncheiren</text:a></text:h>
                  <text:list text:style-name="L11">
                    <text:list-item>
                      <text:p text:style-name="P29"><text:a xlink:type="simple" xlink:href="https://nl.wikipedia.org/wiki/Briareus" text:style-name="Internet_20_link" text:visited-style-name="Visited_20_Internet_20_Link"><text:bookmark text:name="mwgA"/><text:bookmark text:name="mwfw"/><text:bookmark text:name="mwfg"/>Briareus</text:a> </text:p>
                    </text:list-item>
                    <text:list-item>
                      <text:p text:style-name="P29"><text:a xlink:type="simple" xlink:href="https://nl.wikipedia.org/wiki/Cottus_(mythologie)" text:style-name="Internet_20_link" text:visited-style-name="Visited_20_Internet_20_Link"><text:bookmark text:name="mwgg"/><text:bookmark text:name="mwgQ"/>Cottus</text:a> </text:p>
                    </text:list-item>
                    <text:list-item>
                      <text:p text:style-name="P30"><text:a xlink:type="simple" xlink:href="https://nl.wikipedia.org/wiki/Gyges_(mythologie)" text:style-name="Internet_20_link" text:visited-style-name="Visited_20_Internet_20_Link"><text:bookmark text:name="mwhA"/><text:bookmark text:name="mwgw"/>Gyges</text:a></text:p>
                    </text:list-item>
                  </text:list>
                  <text:h text:style-name="P3" text:outline-level="2"><text:a xlink:type="simple" xlink:href="https://nl.wikipedia.org/wiki/Gigant" text:style-name="Internet_20_link" text:visited-style-name="Visited_20_Internet_20_Link"><text:bookmark text:name="mwhg"/><text:bookmark text:name="Giganten"/>Giganten</text:a></text:h>
                  <text:section text:style-name="Sect1" text:name="mwiA">
                    <text:list text:style-name="L12">
                      <text:list-item>
                        <text:p text:style-name="P31"><text:a xlink:type="simple" xlink:href="https://nl.wikipedia.org/wiki/Athos_(mythologie)" text:style-name="Internet_20_link" text:visited-style-name="Visited_20_Internet_20_Link">Athos</text:a> </text:p>
                      </text:list-item>
                      <text:list-item>
                        <text:p text:style-name="P32"><text:a xlink:type="simple" xlink:href="https://nl.wikipedia.org/wiki/Alkyoneus_(Gigant)" text:style-name="Internet_20_link" text:visited-style-name="Visited_20_Internet_20_Link">Alcyoneus</text:a> </text:p>
                      </text:list-item>
                      <text:list-item>
                        <text:p text:style-name="P32"><text:a xlink:type="simple" xlink:href="https://nl.wikipedia.org/wiki/Damasen" text:style-name="Internet_20_link" text:visited-style-name="Visited_20_Internet_20_Link">Damasen</text:a> </text:p>
                      </text:list-item>
                      <text:list-item>
                        <text:p text:style-name="P32"><text:a xlink:type="simple" xlink:href="https://nl.wikipedia.org/wiki/Enceladus_(mythologie)" text:style-name="Internet_20_link" text:visited-style-name="Visited_20_Internet_20_Link">Enceladus</text:a> </text:p>
                      </text:list-item>
                      <text:list-item>
                        <text:p text:style-name="P32"><text:a xlink:type="simple" xlink:href="https://nl.wikipedia.org/wiki/Ephialtes_(mythologie)" text:style-name="Internet_20_link" text:visited-style-name="Visited_20_Internet_20_Link">Ephialtes</text:a> </text:p>
                      </text:list-item>
                      <text:list-item>
                        <text:p text:style-name="P32"><text:a xlink:type="simple" xlink:href="https://nl.wikipedia.org/wiki/Eurymedon_(mythologie)" text:style-name="Internet_20_link" text:visited-style-name="Visited_20_Internet_20_Link">Eurymedon</text:a> </text:p>
                      </text:list-item>
                      <text:list-item>
                        <text:p text:style-name="P32"><text:a xlink:type="simple" xlink:href="https://nl.wikipedia.org/wiki/Mimas_(mythologie)" text:style-name="Internet_20_link" text:visited-style-name="Visited_20_Internet_20_Link">Mimas</text:a> </text:p>
                      </text:list-item>
                      <text:list-item>
                        <text:p text:style-name="P32"><text:a xlink:type="simple" xlink:href="https://nl.wikipedia.org/wiki/Orion_(mythologie)" text:style-name="Internet_20_link" text:visited-style-name="Visited_20_Internet_20_Link">Orion</text:a> </text:p>
                      </text:list-item>
                      <text:list-item>
                        <text:p text:style-name="P32"><text:a xlink:type="simple" xlink:href="https://nl.wikipedia.org/wiki/Pallas_(gigant)?action=edit&amp;redlink=1" text:style-name="Internet_20_link" text:visited-style-name="Visited_20_Internet_20_Link">Pallas</text:a> </text:p>
                      </text:list-item>
                      <text:list-item>
                        <text:p text:style-name="P32"><text:a xlink:type="simple" xlink:href="https://nl.wikipedia.org/wiki/Polybotes" text:style-name="Internet_20_link" text:visited-style-name="Visited_20_Internet_20_Link">Polybotes</text:a> </text:p>
                      </text:list-item>
                      <text:list-item>
                        <text:p text:style-name="P32"><text:a xlink:type="simple" xlink:href="https://nl.wikipedia.org/wiki/Porphyrion" text:style-name="Internet_20_link" text:visited-style-name="Visited_20_Internet_20_Link">Porphyrion</text:a> </text:p>
                      </text:list-item>
                      <text:list-item>
                        <text:p text:style-name="P33"><text:a xlink:type="simple" xlink:href="https://nl.wikipedia.org/wiki/Typhon" text:style-name="Internet_20_link" text:visited-style-name="Visited_20_Internet_20_Link">Typhon</text:a><text:bookmark text:name="Zie_ook"/></text:p>
                      </text:list-item>
                    </text:list>
                  </text:section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4:49:46.729927278</meta:creation-date>
    <dc:date>2026-07-09T18:30:14.258758209</dc:date>
    <meta:editing-duration>PT2H25M53S</meta:editing-duration>
    <meta:editing-cycles>4</meta:editing-cycles>
    <meta:generator>LibreOffice/26.2.4.2$Linux_X86_64 LibreOffice_project/620$Build-2</meta:generator>
    <meta:document-statistic meta:table-count="0" meta:image-count="0" meta:object-count="0" meta:page-count="3" meta:paragraph-count="232" meta:word-count="855" meta:character-count="4697" meta:non-whitespace-character-count="4093"/>
  </office:meta>
</office:document-meta>
</file>